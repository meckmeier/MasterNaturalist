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4.6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mit_histor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commit message</text:p>
          </table:table-cell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3eaf6c8c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rst commit</text:p>
          </table:table-cell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af19e6b8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updating events and roles for a more dense viewing experience.</text:p>
          </table:table-cell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7bb685d5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updates with interface changes to show/hide volunteer and training tabs on org cards based on whether the org has any volunteer or training events. Also added a link to the org location if it exists.</text:p>
          </table:table-cell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1.8789E+037" calcext:value-type="float">
            <text:p>1.8789E+037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updating with new single activity data model</text:p>
          </table:table-cell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string" calcext:value-type="string">
            <text:p>135ca6d0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nalizing the new activities model in the app.</text:p>
          </table:table-cell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string" calcext:value-type="string">
            <text:p>4f211205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adding a readme file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dd95efad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prepare for render deploy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f7035613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rendering deploying via ui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f4ecd61c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adding json with data for preloading app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25c509a4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adding can-edit logic for icon visibility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cd6e1f93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adding setting for debug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aefed874</text:p>
          </table:table-cell>
          <table:table-cell office:value-type="string" calcext:value-type="string">
            <text:p>first version</text:p>
          </table:table-cell>
          <table:table-cell office:value-type="string" calcext:value-type="string">
            <text:p>adding local env variables</text:p>
          </table:table-cell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string" calcext:value-type="string">
            <text:p>bbf6f661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adding better navigation, about page and starting on map functionality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a67281f1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adding backend email settings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9ca9af1f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adding test email endpoint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ba6b7612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changing to postmark email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48190ede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adding postmark to requirements file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69bbcc59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test email using postmark</text:p>
          </table:table-cell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string" calcext:value-type="string">
            <text:p>2634c0f5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modifying workflow to be a tool not a diretory</text:p>
          </table:table-cell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string" calcext:value-type="string">
            <text:p>ab61d8aa</text:p>
          </table:table-cell>
          <table:table-cell office:value-type="string" calcext:value-type="string">
            <text:p>map, polish</text:p>
          </table:table-cell>
          <table:table-cell office:value-type="string" calcext:value-type="string">
            <text:p>adjusting new flow</text:p>
          </table:table-cell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string" calcext:value-type="string">
            <text:p>82ebea7e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management view for orgs</text:p>
          </table:table-cell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table:style-name="ce2" office:value-type="string" calcext:value-type="string">
            <text:p>0371e613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org managerment feature</text:p>
          </table:table-cell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string" calcext:value-type="string">
            <text:p>5ed6a7e8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unrolling duplicate issue for location</text:p>
          </table:table-cell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string" calcext:value-type="string">
            <text:p>7b0ee6cf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fix dups</text:p>
          </table:table-cell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string" calcext:value-type="string">
            <text:p>e92c0df4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org management enhancements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d2e8cd48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adding file upload featur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b99cb80b</text:p>
          </table:table-cell>
          <table:table-cell office:value-type="string" calcext:value-type="string">
            <text:p>org focus</text:p>
          </table:table-cell>
          <table:table-cell office:value-type="string" calcext:value-type="string">
            <text:p>downgrading python to 3.11.4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28df93aa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css test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9d86bedf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moving styles.css to css folder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424d4133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stop tracking virtual environment: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86fa74c1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still fixing css files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02a3d070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remove venv from git tracking again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0e1d4af6</text:p>
          </table:table-cell>
          <table:table-cell office:value-type="string" calcext:value-type="string">
            <text:p>new logo/style</text:p>
          </table:table-cell>
          <table:table-cell office:value-type="string" calcext:value-type="string">
            <text:p>remove venv and staticfile from git tracking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4028152d</text:p>
          </table:table-cell>
          <table:table-cell office:value-type="string" calcext:value-type="string">
            <text:p>new login/ bot attack</text:p>
          </table:table-cell>
          <table:table-cell office:value-type="string" calcext:value-type="string">
            <text:p>testing out of domain email routine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8713da6a</text:p>
          </table:table-cell>
          <table:table-cell office:value-type="string" calcext:value-type="string">
            <text:p>new login/ bot attack</text:p>
          </table:table-cell>
          <table:table-cell office:value-type="string" calcext:value-type="string">
            <text:p>test email form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311e0b35</text:p>
          </table:table-cell>
          <table:table-cell office:value-type="string" calcext:value-type="string">
            <text:p>new login/ bot attack</text:p>
          </table:table-cell>
          <table:table-cell office:value-type="string" calcext:value-type="string">
            <text:p>adding test email form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177703de</text:p>
          </table:table-cell>
          <table:table-cell office:value-type="string" calcext:value-type="string">
            <text:p>new login/ bot attack</text:p>
          </table:table-cell>
          <table:table-cell office:value-type="string" calcext:value-type="string">
            <text:p>changing reset password timeout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994321b5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changing the name to wildpaths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76ebed44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fixing logo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string" calcext:value-type="string">
            <text:p>0a8c27d2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fixing logo filename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e1c36b36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current dev work on load processing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84910bee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schema changes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f7bd198d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adding constraint to location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f441fe28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bringing current dev back into main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c20cb87a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schema ready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49925565" calcext:value-type="float">
            <text:p>49925565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schema complete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1e1782f3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resolved merge conflict</text:p>
          </table:table-cell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string" calcext:value-type="string">
            <text:p>28cd0a63</text:p>
          </table:table-cell>
          <table:table-cell office:value-type="string" calcext:value-type="string">
            <text:p>WildPath</text:p>
          </table:table-cell>
          <table:table-cell office:value-type="string" calcext:value-type="string">
            <text:p>Reset orgs migrations to clean baseline</text:p>
          </table:table-cell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string" calcext:value-type="string">
            <text:p>367c1b37</text:p>
          </table:table-cell>
          <table:table-cell/>
          <table:table-cell office:value-type="string" calcext:value-type="string">
            <text:p>Default locations implementation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e74835d1</text:p>
          </table:table-cell>
          <table:table-cell/>
          <table:table-cell office:value-type="string" calcext:value-type="string">
            <text:p>Finalizing Location setup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7de5797f</text:p>
          </table:table-cell>
          <table:table-cell/>
          <table:table-cell office:value-type="string" calcext:value-type="string">
            <text:p>adding csv files for location load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263fb2ea</text:p>
          </table:table-cell>
          <table:table-cell/>
          <table:table-cell office:value-type="string" calcext:value-type="string">
            <text:p>fixing issue with the location of the dataset and gitignore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e7aa61ac</text:p>
          </table:table-cell>
          <table:table-cell/>
          <table:table-cell office:value-type="string" calcext:value-type="string">
            <text:p>removing print commands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38263ea9</text:p>
          </table:table-cell>
          <table:table-cell/>
          <table:table-cell office:value-type="string" calcext:value-type="string">
            <text:p>adding updated requirements.txt</text:p>
          </table:table-cell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string" calcext:value-type="string">
            <text:p>cff1c2cd</text:p>
          </table:table-cell>
          <table:table-cell/>
          <table:table-cell office:value-type="string" calcext:value-type="string">
            <text:p>location selection on activity form</text:p>
          </table:table-cell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string" calcext:value-type="string">
            <text:p>2f1c8279</text:p>
          </table:table-cell>
          <table:table-cell/>
          <table:table-cell office:value-type="string" calcext:value-type="string">
            <text:p>Incorporating the add new location modal</text:p>
          </table:table-cell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string" calcext:value-type="string">
            <text:p>9a58448b</text:p>
          </table:table-cell>
          <table:table-cell/>
          <table:table-cell office:value-type="string" calcext:value-type="string">
            <text:p>adding updatelatlng as management command</text:p>
          </table:table-cell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string" calcext:value-type="string">
            <text:p>5835d456</text:p>
          </table:table-cell>
          <table:table-cell/>
          <table:table-cell office:value-type="string" calcext:value-type="string">
            <text:p>adding locations with map</text:p>
          </table:table-cell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string" calcext:value-type="string">
            <text:p>d492ab0e</text:p>
          </table:table-cell>
          <table:table-cell/>
          <table:table-cell office:value-type="string" calcext:value-type="string">
            <text:p>added disclaimer, privacy policy and terms of service</text:p>
          </table:table-cell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string" calcext:value-type="string">
            <text:p>549c2977</text:p>
          </table:table-cell>
          <table:table-cell/>
          <table:table-cell office:value-type="string" calcext:value-type="string">
            <text:p>adding in filter to show all activities in dashboard but highlight deleted ones</text:p>
          </table:table-cell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string" calcext:value-type="string">
            <text:p>e0f258b3</text:p>
          </table:table-cell>
          <table:table-cell/>
          <table:table-cell office:value-type="string" calcext:value-type="string">
            <text:p>fix to update latlng</text:p>
          </table:table-cell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string" calcext:value-type="string">
            <text:p>ee12dba8</text:p>
          </table:table-cell>
          <table:table-cell/>
          <table:table-cell office:value-type="string" calcext:value-type="string">
            <text:p>adding feedback and some minor appearance tweeks</text:p>
          </table:table-cell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string" calcext:value-type="string">
            <text:p>b6e4d741</text:p>
          </table:table-cell>
          <table:table-cell/>
          <table:table-cell office:value-type="string" calcext:value-type="string">
            <text:p>adding form css to feedback.</text:p>
          </table:table-cell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81699481" calcext:value-type="float">
            <text:p>81699481</text:p>
          </table:table-cell>
          <table:table-cell/>
          <table:table-cell office:value-type="string" calcext:value-type="string">
            <text:p>tighten forms to include more validation.</text:p>
          </table:table-cell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string" calcext:value-type="string">
            <text:p>e1dbdc66</text:p>
          </table:table-cell>
          <table:table-cell/>
          <table:table-cell office:value-type="string" calcext:value-type="string">
            <text:p>finalizing form maintenance</text:p>
          </table:table-cell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string" calcext:value-type="string">
            <text:p>a3e6a6d3</text:p>
          </table:table-cell>
          <table:table-cell/>
          <table:table-cell office:value-type="string" calcext:value-type="string">
            <text:p>finalizing form changes</text:p>
          </table:table-cell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string" calcext:value-type="string">
            <text:p>b03bc46b</text:p>
          </table:table-cell>
          <table:table-cell/>
          <table:table-cell office:value-type="string" calcext:value-type="string">
            <text:p>final form changes</text:p>
          </table:table-cell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43446796" calcext:value-type="float">
            <text:p>43446796</text:p>
          </table:table-cell>
          <table:table-cell/>
          <table:table-cell office:value-type="string" calcext:value-type="string">
            <text:p>adding colors and changing logo</text:p>
          </table:table-cell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string" calcext:value-type="string">
            <text:p>ede0c2a2</text:p>
          </table:table-cell>
          <table:table-cell/>
          <table:table-cell office:value-type="string" calcext:value-type="string">
            <text:p>adding back the old logo</text:p>
          </table:table-cell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string" calcext:value-type="string">
            <text:p>2b66fee1</text:p>
          </table:table-cell>
          <table:table-cell/>
          <table:table-cell office:value-type="string" calcext:value-type="string">
            <text:p>minor updates. added self directed format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ddc1cbfe</text:p>
          </table:table-cell>
          <table:table-cell/>
          <table:table-cell office:value-type="string" calcext:value-type="string">
            <text:p>adjusting filters to be more userfriendly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6d3682df</text:p>
          </table:table-cell>
          <table:table-cell/>
          <table:table-cell office:value-type="string" calcext:value-type="string">
            <text:p>updating no cost field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71f230d3</text:p>
          </table:table-cell>
          <table:table-cell/>
          <table:table-cell office:value-type="string" calcext:value-type="string">
            <text:p>Fixing category break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6d9479ad</text:p>
          </table:table-cell>
          <table:table-cell/>
          <table:table-cell office:value-type="string" calcext:value-type="string">
            <text:p>adding adjustment to the buttons for mobile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b54c3b6a</text:p>
          </table:table-cell>
          <table:table-cell/>
          <table:table-cell office:value-type="string" calcext:value-type="string">
            <text:p>adding logo images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b926f479</text:p>
          </table:table-cell>
          <table:table-cell/>
          <table:table-cell office:value-type="string" calcext:value-type="string">
            <text:p>adding in charge icon</text:p>
          </table:table-cell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string" calcext:value-type="string">
            <text:p>17b30bdf</text:p>
          </table:table-cell>
          <table:table-cell/>
          <table:table-cell office:value-type="string" calcext:value-type="string">
            <text:p>edits per Tim Meeting</text:p>
          </table:table-cell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string" calcext:value-type="string">
            <text:p>eb2f3f23</text:p>
          </table:table-cell>
          <table:table-cell/>
          <table:table-cell office:value-type="string" calcext:value-type="string">
            <text:p>fixing color on hamburger menu</text:p>
          </table:table-cell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string" calcext:value-type="string">
            <text:p>7a55cad5</text:p>
          </table:table-cell>
          <table:table-cell/>
          <table:table-cell office:value-type="string" calcext:value-type="string">
            <text:p>coloring map icons</text:p>
          </table:table-cell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string" calcext:value-type="string">
            <text:p>2b376922</text:p>
          </table:table-cell>
          <table:table-cell/>
          <table:table-cell office:value-type="string" calcext:value-type="string">
            <text:p>adding new about page</text:p>
          </table:table-cell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string" calcext:value-type="string">
            <text:p>9bd66184</text:p>
          </table:table-cell>
          <table:table-cell/>
          <table:table-cell office:value-type="string" calcext:value-type="string">
            <text:p>adding faq to upload process</text:p>
          </table:table-cell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string" calcext:value-type="string">
            <text:p>3398b44c</text:p>
          </table:table-cell>
          <table:table-cell/>
          <table:table-cell office:value-type="string" calcext:value-type="string">
            <text:p>fixing the filter button on activities and adding in some additional formatting.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fc11aab9</text:p>
          </table:table-cell>
          <table:table-cell/>
          <table:table-cell office:value-type="string" calcext:value-type="string">
            <text:p>fixing location list layout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6ea04407</text:p>
          </table:table-cell>
          <table:table-cell/>
          <table:table-cell office:value-type="string" calcext:value-type="string">
            <text:p>fixing broken links</text:p>
          </table:table-cell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string" calcext:value-type="string">
            <text:p>d39e2113</text:p>
          </table:table-cell>
          <table:table-cell/>
          <table:table-cell office:value-type="string" calcext:value-type="string">
            <text:p>trying new color combinations</text:p>
          </table:table-cell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46393988" calcext:value-type="float">
            <text:p>46393988</text:p>
          </table:table-cell>
          <table:table-cell/>
          <table:table-cell office:value-type="string" calcext:value-type="string">
            <text:p>consistent new button format</text:p>
          </table:table-cell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string" calcext:value-type="string">
            <text:p>bddd012d</text:p>
          </table:table-cell>
          <table:table-cell/>
          <table:table-cell office:value-type="string" calcext:value-type="string">
            <text:p>removed sticky top and fixed location view button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a16b897b</text:p>
          </table:table-cell>
          <table:table-cell/>
          <table:table-cell office:value-type="string" calcext:value-type="string">
            <text:p>another pass on the buttons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3ca9f169</text:p>
          </table:table-cell>
          <table:table-cell/>
          <table:table-cell office:value-type="string" calcext:value-type="string">
            <text:p>redirect on edit to view posted element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6b76dc8d</text:p>
          </table:table-cell>
          <table:table-cell/>
          <table:table-cell office:value-type="string" calcext:value-type="string">
            <text:p>fixing the location picker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da3416cf</text:p>
          </table:table-cell>
          <table:table-cell/>
          <table:table-cell office:value-type="string" calcext:value-type="string">
            <text:p>updating text to be a be less wordy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78b3e572</text:p>
          </table:table-cell>
          <table:table-cell/>
          <table:table-cell office:value-type="string" calcext:value-type="string">
            <text:p>fixing location search button on new sessions</text:p>
          </table:table-cell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string" calcext:value-type="string">
            <text:p>b54484fd</text:p>
          </table:table-cell>
          <table:table-cell/>
          <table:table-cell office:value-type="string" calcext:value-type="string">
            <text:p>changing dates on activity_item to wrap</text:p>
          </table:table-cell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string" calcext:value-type="string">
            <text:p>3ca107ed</text:p>
          </table:table-cell>
          <table:table-cell/>
          <table:table-cell office:value-type="string" calcext:value-type="string">
            <text:p>adding media query for smaller font on small iphone</text:p>
          </table:table-cell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string" calcext:value-type="string">
            <text:p>a96e2ee9</text:p>
          </table:table-cell>
          <table:table-cell/>
          <table:table-cell office:value-type="string" calcext:value-type="string">
            <text:p>adjusting the datasets for the sorts in activities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c77d6a46</text:p>
          </table:table-cell>
          <table:table-cell/>
          <table:table-cell office:value-type="string" calcext:value-type="string">
            <text:p>adding tiered menu and email subject lines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222a5621</text:p>
          </table:table-cell>
          <table:table-cell/>
          <table:table-cell office:value-type="string" calcext:value-type="string">
            <text:p>organized menu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cdd01016</text:p>
          </table:table-cell>
          <table:table-cell/>
          <table:table-cell office:value-type="string" calcext:value-type="string">
            <text:p>fixing the location add-must save org first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7afb0a6e</text:p>
          </table:table-cell>
          <table:table-cell/>
          <table:table-cell office:value-type="string" calcext:value-type="string">
            <text:p>fixing org save button for non staff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ad584afc</text:p>
          </table:table-cell>
          <table:table-cell/>
          <table:table-cell office:value-type="string" calcext:value-type="string">
            <text:p>adding ongoing filters to activities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551cb90e</text:p>
          </table:table-cell>
          <table:table-cell/>
          <table:table-cell office:value-type="string" calcext:value-type="string">
            <text:p>adding in Has Actvities filter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fd08be1b</text:p>
          </table:table-cell>
          <table:table-cell/>
          <table:table-cell office:value-type="string" calcext:value-type="string">
            <text:p>more tiny fixes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table:style-name="ce2" office:value-type="string" calcext:value-type="string">
            <text:p>3852e364</text:p>
          </table:table-cell>
          <table:table-cell table:style-name="ce2"/>
          <table:table-cell office:value-type="string" calcext:value-type="string">
            <text:p>moving online flag in session build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9073313d</text:p>
          </table:table-cell>
          <table:table-cell/>
          <table:table-cell office:value-type="string" calcext:value-type="string">
            <text:p>another little fix on online location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6fe6a876</text:p>
          </table:table-cell>
          <table:table-cell/>
          <table:table-cell office:value-type="string" calcext:value-type="string">
            <text:p>adding link to org from location list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7823aef0</text:p>
          </table:table-cell>
          <table:table-cell/>
          <table:table-cell office:value-type="string" calcext:value-type="string">
            <text:p>file issue replaced.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3cdd1eae</text:p>
          </table:table-cell>
          <table:table-cell/>
          <table:table-cell office:value-type="string" calcext:value-type="string">
            <text:p>adding template file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string" calcext:value-type="string">
            <text:p>7fdc59d8</text:p>
          </table:table-cell>
          <table:table-cell/>
          <table:table-cell office:value-type="string" calcext:value-type="string">
            <text:p>updating correct template file</text:p>
          </table:table-cell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string" calcext:value-type="string">
            <text:p>9c8cc2e4</text:p>
          </table:table-cell>
          <table:table-cell/>
          <table:table-cell office:value-type="string" calcext:value-type="string">
            <text:p>fixing location view back to tabs like in orgs</text:p>
          </table:table-cell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string" calcext:value-type="string">
            <text:p>0cb669a3</text:p>
          </table:table-cell>
          <table:table-cell/>
          <table:table-cell office:value-type="string" calcext:value-type="string">
            <text:p>disabling import routine</text:p>
          </table:table-cell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string" calcext:value-type="string">
            <text:p>cad1b50d</text:p>
          </table:table-cell>
          <table:table-cell/>
          <table:table-cell office:value-type="string" calcext:value-type="string">
            <text:p>fixing broken div structure on location</text:p>
          </table:table-cell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string" calcext:value-type="string">
            <text:p>5828c33e</text:p>
          </table:table-cell>
          <table:table-cell/>
          <table:table-cell office:value-type="string" calcext:value-type="string">
            <text:p>version two - allauth login routine, menu changes and addition of staff menu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string" calcext:value-type="string">
            <text:p>92b68802</text:p>
          </table:table-cell>
          <table:table-cell/>
          <table:table-cell office:value-type="string" calcext:value-type="string">
            <text:p>adding captcha to the signup form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string" calcext:value-type="string">
            <text:p>caa7b8b3</text:p>
          </table:table-cell>
          <table:table-cell/>
          <table:table-cell office:value-type="string" calcext:value-type="string">
            <text:p>moving public access to include volunteer stuff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string" calcext:value-type="string">
            <text:p>3b5184ea</text:p>
          </table:table-cell>
          <table:table-cell/>
          <table:table-cell office:value-type="string" calcext:value-type="string">
            <text:p>adding public access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string" calcext:value-type="string">
            <text:p>66b804c9</text:p>
          </table:table-cell>
          <table:table-cell/>
          <table:table-cell office:value-type="string" calcext:value-type="string">
            <text:p>adding hide/show on the ongoing button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string" calcext:value-type="string">
            <text:p>cd32016f</text:p>
          </table:table-cell>
          <table:table-cell/>
          <table:table-cell office:value-type="string" calcext:value-type="string">
            <text:p>adjustment to filters and showing results found on three main pages</text:p>
          </table:table-cell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string" calcext:value-type="string">
            <text:p>ebbc202b</text:p>
          </table:table-cell>
          <table:table-cell/>
          <table:table-cell office:value-type="string" calcext:value-type="string">
            <text:p>Finishing the Add Organization flow. Need email reset on 5/22 to test</text:p>
          </table:table-cell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string" calcext:value-type="string">
            <text:p>ed78a8d8</text:p>
          </table:table-cell>
          <table:table-cell/>
          <table:table-cell office:value-type="string" calcext:value-type="string">
            <text:p>setup for 2FA not implemented. also filter hide favorite references if not logged in</text:p>
          </table:table-cell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string" calcext:value-type="string">
            <text:p>83c33022</text:p>
          </table:table-cell>
          <table:table-cell/>
          <table:table-cell office:value-type="string" calcext:value-type="string">
            <text:p>disabling registration link to prevent new bots from adding to my userlist</text:p>
          </table:table-cell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string" calcext:value-type="string">
            <text:p>4deb5a11</text:p>
          </table:table-cell>
          <table:table-cell/>
          <table:table-cell office:value-type="string" calcext:value-type="string">
            <text:p>adding turnstile to feedback form</text:p>
          </table:table-cell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string" calcext:value-type="string">
            <text:p>0a542363</text:p>
          </table:table-cell>
          <table:table-cell/>
          <table:table-cell office:value-type="string" calcext:value-type="string">
            <text:p>new login process, started on the upload process. Am trying to test new email functionality.</text:p>
          </table:table-cell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string" calcext:value-type="string">
            <text:p>d7a7daf3</text:p>
          </table:table-cell>
          <table:table-cell/>
          <table:table-cell office:value-type="string" calcext:value-type="string">
            <text:p>adding turnstile to the OrgEnrollment form</text:p>
          </table:table-cell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string" calcext:value-type="string">
            <text:p>8027b0d6</text:p>
          </table:table-cell>
          <table:table-cell/>
          <table:table-cell office:value-type="string" calcext:value-type="string">
            <text:p>testing email from feebackform</text:p>
          </table:table-cell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string" calcext:value-type="string">
            <text:p>494a358b</text:p>
          </table:table-cell>
          <table:table-cell/>
          <table:table-cell office:value-type="string" calcext:value-type="string">
            <text:p>changing setting to get SERVER_EMAIL configured</text:p>
          </table:table-cell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string" calcext:value-type="string">
            <text:p>150c5704</text:p>
          </table:table-cell>
          <table:table-cell/>
          <table:table-cell office:value-type="string" calcext:value-type="string">
            <text:p>full migration to allauth for user accounts</text:p>
          </table:table-cell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 office:value-type="string" calcext:value-type="string">
            <text:p>e803b79a</text:p>
          </table:table-cell>
          <table:table-cell/>
          <table:table-cell office:value-type="string" calcext:value-type="string">
            <text:p>version two: includes upload process</text:p>
          </table:table-cell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 office:value-type="string" calcext:value-type="string">
            <text:p>b45510f9</text:p>
          </table:table-cell>
          <table:table-cell/>
          <table:table-cell office:value-type="string" calcext:value-type="string">
            <text:p>fixing server 500 error</text:p>
          </table:table-cell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 office:value-type="string" calcext:value-type="string">
            <text:p>52502d94</text:p>
          </table:table-cell>
          <table:table-cell/>
          <table:table-cell office:value-type="string" calcext:value-type="string">
            <text:p>adding error tracking for server 500 error</text:p>
          </table:table-cell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 office:value-type="string" calcext:value-type="string">
            <text:p>0f245b51</text:p>
          </table:table-cell>
          <table:table-cell/>
          <table:table-cell office:value-type="string" calcext:value-type="string">
            <text:p>adding cancel and logging on rollback</text:p>
          </table:table-cell>
        </table:table-row>
        <table:table-row table:style-name="ro1">
          <table:table-cell office:value-type="date" office:date-value="2026-06-10" calcext:value-type="date">
            <text:p>2026-06-10</text:p>
          </table:table-cell>
          <table:table-cell office:value-type="string" calcext:value-type="string">
            <text:p>570d8774</text:p>
          </table:table-cell>
          <table:table-cell/>
          <table:table-cell office:value-type="string" calcext:value-type="string">
            <text:p>adding updates to the load process</text:p>
          </table:table-cell>
        </table:table-row>
        <table:table-row table:style-name="ro1">
          <table:table-cell office:value-type="date" office:date-value="2026-06-11" calcext:value-type="date">
            <text:p>2026-06-11</text:p>
          </table:table-cell>
          <table:table-cell office:value-type="string" calcext:value-type="string">
            <text:p>bf415d4c</text:p>
          </table:table-cell>
          <table:table-cell/>
          <table:table-cell office:value-type="string" calcext:value-type="string">
            <text:p>minor page adjustments</text:p>
          </table:table-cell>
        </table:table-row>
        <table:table-row table:style-name="ro1">
          <table:table-cell office:value-type="date" office:date-value="2026-06-13" calcext:value-type="date">
            <text:p>2026-06-13</text:p>
          </table:table-cell>
          <table:table-cell office:value-type="string" calcext:value-type="string">
            <text:p>876edeaf</text:p>
          </table:table-cell>
          <table:table-cell/>
          <table:table-cell office:value-type="string" calcext:value-type="string">
            <text:p>adding confirm rollback and minor text changes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string" calcext:value-type="string">
            <text:p>a818d789</text:p>
          </table:table-cell>
          <table:table-cell/>
          <table:table-cell office:value-type="string" calcext:value-type="string">
            <text:p>updating buttons for upload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float" office:value="52610200" calcext:value-type="float">
            <text:p>52610200</text:p>
          </table:table-cell>
          <table:table-cell/>
          <table:table-cell office:value-type="string" calcext:value-type="string">
            <text:p>adding new logo file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string" calcext:value-type="string">
            <text:p>0175db1b</text:p>
          </table:table-cell>
          <table:table-cell/>
          <table:table-cell office:value-type="string" calcext:value-type="string">
            <text:p>changing green to dark green: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string" calcext:value-type="string">
            <text:p>8f1ac523</text:p>
          </table:table-cell>
          <table:table-cell/>
          <table:table-cell office:value-type="string" calcext:value-type="string">
            <text:p>more logo changes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string" calcext:value-type="string">
            <text:p>c634d5e6</text:p>
          </table:table-cell>
          <table:table-cell/>
          <table:table-cell office:value-type="string" calcext:value-type="string">
            <text:p>another logo change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office:value-type="string" calcext:value-type="string">
            <text:p>a5993a89</text:p>
          </table:table-cell>
          <table:table-cell/>
          <table:table-cell office:value-type="string" calcext:value-type="string">
            <text:p>final logo chang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e110c5bc</text:p>
          </table:table-cell>
          <table:table-cell/>
          <table:table-cell office:value-type="string" calcext:value-type="string">
            <text:p>button consistency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6745396c</text:p>
          </table:table-cell>
          <table:table-cell/>
          <table:table-cell office:value-type="string" calcext:value-type="string">
            <text:p>more button edits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office:value-type="string" calcext:value-type="string">
            <text:p>e4389cab</text:p>
          </table:table-cell>
          <table:table-cell/>
          <table:table-cell office:value-type="string" calcext:value-type="string">
            <text:p>Adding legend to the map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office:value-type="string" calcext:value-type="string">
            <text:p>805755c7</text:p>
          </table:table-cell>
          <table:table-cell/>
          <table:table-cell office:value-type="string" calcext:value-type="string">
            <text:p>adding filter to organizations list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office:value-type="string" calcext:value-type="string">
            <text:p>69c1a06c</text:p>
          </table:table-cell>
          <table:table-cell/>
          <table:table-cell office:value-type="string" calcext:value-type="string">
            <text:p>updating faq and adding a clear filter to all main pages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office:value-type="string" calcext:value-type="string">
            <text:p>c4776e74</text:p>
          </table:table-cell>
          <table:table-cell/>
          <table:table-cell office:value-type="string" calcext:value-type="string">
            <text:p>adding copyright notice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office:value-type="string" calcext:value-type="string">
            <text:p>f457e382</text:p>
          </table:table-cell>
          <table:table-cell/>
          <table:table-cell office:value-type="string" calcext:value-type="string">
            <text:p>adding categories to the upload process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office:value-type="string" calcext:value-type="string">
            <text:p>2b625178</text:p>
          </table:table-cell>
          <table:table-cell/>
          <table:table-cell office:value-type="string" calcext:value-type="string">
            <text:p>fixing error from first test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office:value-type="string" calcext:value-type="string">
            <text:p>27eeeaf5</text:p>
          </table:table-cell>
          <table:table-cell/>
          <table:table-cell office:value-type="string" calcext:value-type="string">
            <text:p>adding description to template file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office:value-type="string" calcext:value-type="string">
            <text:p>198e6c83</text:p>
          </table:table-cell>
          <table:table-cell/>
          <table:table-cell office:value-type="string" calcext:value-type="string">
            <text:p>language on upload page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office:value-type="string" calcext:value-type="string">
            <text:p>323ce945</text:p>
          </table:table-cell>
          <table:table-cell/>
          <table:table-cell office:value-type="string" calcext:value-type="string">
            <text:p>adding a new filter to activities</text:p>
          </table:table-cell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 office:value-type="string" calcext:value-type="string">
            <text:p>af35c27c</text:p>
          </table:table-cell>
          <table:table-cell/>
          <table:table-cell office:value-type="string" calcext:value-type="string">
            <text:p>updating region to model</text:p>
          </table:table-cell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 office:value-type="string" calcext:value-type="string">
            <text:p>d74ec0cc</text:p>
          </table:table-cell>
          <table:table-cell/>
          <table:table-cell office:value-type="string" calcext:value-type="string">
            <text:p>new region applied to the views</text:p>
          </table:table-cell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 office:value-type="string" calcext:value-type="string">
            <text:p>1814e8a8</text:p>
          </table:table-cell>
          <table:table-cell/>
          <table:table-cell office:value-type="string" calcext:value-type="string">
            <text:p>adding new image files for regions</text:p>
          </table:table-cell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 office:value-type="string" calcext:value-type="string">
            <text:p>c89283bd</text:p>
          </table:table-cell>
          <table:table-cell/>
          <table:table-cell office:value-type="string" calcext:value-type="string">
            <text:p>fixing the code for showing the elements</text:p>
          </table:table-cell>
        </table:table-row>
        <table:table-row table:style-name="ro1">
          <table:table-cell office:value-type="date" office:date-value="2026-06-27" calcext:value-type="date">
            <text:p>2026-06-27</text:p>
          </table:table-cell>
          <table:table-cell office:value-type="string" calcext:value-type="string">
            <text:p>df71dcac</text:p>
          </table:table-cell>
          <table:table-cell/>
          <table:table-cell office:value-type="string" calcext:value-type="string">
            <text:p>updating filters to work with new region field</text:p>
          </table:table-cell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 office:value-type="string" calcext:value-type="string">
            <text:p>1a6db714</text:p>
          </table:table-cell>
          <table:table-cell/>
          <table:table-cell office:value-type="string" calcext:value-type="string">
            <text:p>removing old region_name fields</text:p>
          </table:table-cell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 office:value-type="string" calcext:value-type="string">
            <text:p>3e8d7ead</text:p>
          </table:table-cell>
          <table:table-cell/>
          <table:table-cell office:value-type="string" calcext:value-type="string">
            <text:p>updating some language</text:p>
          </table:table-cell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 office:value-type="string" calcext:value-type="string">
            <text:p>946bf7b5</text:p>
          </table:table-cell>
          <table:table-cell/>
          <table:table-cell office:value-type="string" calcext:value-type="string">
            <text:p>adding in tutorial pages</text:p>
          </table:table-cell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 office:value-type="string" calcext:value-type="string">
            <text:p>25e1df1a</text:p>
          </table:table-cell>
          <table:table-cell/>
          <table:table-cell office:value-type="string" calcext:value-type="string">
            <text:p>new version of video links</text:p>
          </table:table-cell>
        </table:table-row>
        <table:table-row table:style-name="ro1">
          <table:table-cell office:value-type="date" office:date-value="2026-07-01" calcext:value-type="date">
            <text:p>2026-07-01</text:p>
          </table:table-cell>
          <table:table-cell office:value-type="string" calcext:value-type="string">
            <text:p>224bbc83</text:p>
          </table:table-cell>
          <table:table-cell/>
          <table:table-cell office:value-type="string" calcext:value-type="string">
            <text:p>adding in self selected locations to upload</text:p>
          </table:table-cell>
        </table:table-row>
        <table:table-row table:style-name="ro1">
          <table:table-cell office:value-type="date" office:date-value="2026-07-04" calcext:value-type="date">
            <text:p>2026-07-04</text:p>
          </table:table-cell>
          <table:table-cell office:value-type="string" calcext:value-type="string">
            <text:p>37f41605</text:p>
          </table:table-cell>
          <table:table-cell/>
          <table:table-cell office:value-type="string" calcext:value-type="string">
            <text:p>changing training to learn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74de7077</text:p>
          </table:table-cell>
          <table:table-cell/>
          <table:table-cell office:value-type="string" calcext:value-type="string">
            <text:p>adding in highlight for all word search pages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d8f8ca8b</text:p>
          </table:table-cell>
          <table:table-cell/>
          <table:table-cell office:value-type="string" calcext:value-type="string">
            <text:p>adding sort on activities to move ongoing to the end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271b6428</text:p>
          </table:table-cell>
          <table:table-cell/>
          <table:table-cell office:value-type="string" calcext:value-type="string">
            <text:p>minor updates, rolling back to using hybrid sessions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b137db79</text:p>
          </table:table-cell>
          <table:table-cell/>
          <table:table-cell office:value-type="string" calcext:value-type="string">
            <text:p>refining card layout for ongoing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e873d8ee</text:p>
          </table:table-cell>
          <table:table-cell/>
          <table:table-cell office:value-type="string" calcext:value-type="string">
            <text:p>updates to the training videos</text:p>
          </table:table-cell>
        </table:table-row>
        <table:table-row table:style-name="ro1">
          <table:table-cell office:value-type="date" office:date-value="2026-07-06" calcext:value-type="date">
            <text:p>2026-07-06</text:p>
          </table:table-cell>
          <table:table-cell office:value-type="float" office:value="76330679" calcext:value-type="float">
            <text:p>76330679</text:p>
          </table:table-cell>
          <table:table-cell/>
          <table:table-cell office:value-type="string" calcext:value-type="string">
            <text:p>adding more help documents</text:p>
          </table:table-cell>
        </table:table-row>
        <table:table-row table:style-name="ro1">
          <table:table-cell office:value-type="date" office:date-value="2026-07-06" calcext:value-type="date">
            <text:p>2026-07-06</text:p>
          </table:table-cell>
          <table:table-cell office:value-type="string" calcext:value-type="string">
            <text:p>0fbe04c1</text:p>
          </table:table-cell>
          <table:table-cell/>
          <table:table-cell office:value-type="string" calcext:value-type="string">
            <text:p>adjusting the labels and language on location form</text:p>
          </table:table-cell>
        </table:table-row>
        <table:table-row table:style-name="ro1">
          <table:table-cell office:value-type="date" office:date-value="2026-07-06" calcext:value-type="date">
            <text:p>2026-07-06</text:p>
          </table:table-cell>
          <table:table-cell office:value-type="string" calcext:value-type="string">
            <text:p>7c8c1da7</text:p>
          </table:table-cell>
          <table:table-cell/>
          <table:table-cell office:value-type="string" calcext:value-type="string">
            <text:p>more updates to help files</text:p>
          </table:table-cell>
        </table:table-row>
        <table:table-row table:style-name="ro1">
          <table:table-cell office:value-type="date" office:date-value="2026-07-07" calcext:value-type="date">
            <text:p>2026-07-07</text:p>
          </table:table-cell>
          <table:table-cell office:value-type="string" calcext:value-type="string">
            <text:p>4ca6c4cd</text:p>
          </table:table-cell>
          <table:table-cell/>
          <table:table-cell office:value-type="string" calcext:value-type="string">
            <text:p>fix mobile view ofhelp page</text:p>
          </table:table-cell>
        </table:table-row>
        <table:table-row table:style-name="ro1">
          <table:table-cell office:value-type="date" office:date-value="2026-07-07" calcext:value-type="date">
            <text:p>2026-07-07</text:p>
          </table:table-cell>
          <table:table-cell office:value-type="string" calcext:value-type="string">
            <text:p>74f6a9fc</text:p>
          </table:table-cell>
          <table:table-cell/>
          <table:table-cell office:value-type="string" calcext:value-type="string">
            <text:p>fixing links on about page</text:p>
          </table:table-cell>
        </table:table-row>
        <table:table-row table:style-name="ro1">
          <table:table-cell office:value-type="date" office:date-value="2026-07-14" calcext:value-type="date">
            <text:p>2026-07-14</text:p>
          </table:table-cell>
          <table:table-cell office:value-type="string" calcext:value-type="string">
            <text:p>a4234b11</text:p>
          </table:table-cell>
          <table:table-cell/>
          <table:table-cell office:value-type="string" calcext:value-type="string">
            <text:p>adding the upload activities video</text:p>
          </table:table-cell>
        </table:table-row>
        <table:table-row table:style-name="ro1">
          <table:table-cell office:value-type="date" office:date-value="2026-07-15" calcext:value-type="date">
            <text:p>2026-07-15</text:p>
          </table:table-cell>
          <table:table-cell office:value-type="string" calcext:value-type="string">
            <text:p>4ec29eda</text:p>
          </table:table-cell>
          <table:table-cell/>
          <table:table-cell office:value-type="string" calcext:value-type="string">
            <text:p>adding in a calendar view</text:p>
          </table:table-cell>
        </table:table-row>
        <table:table-row table:style-name="ro1">
          <table:table-cell office:value-type="date" office:date-value="2026-07-15" calcext:value-type="date">
            <text:p>2026-07-15</text:p>
          </table:table-cell>
          <table:table-cell office:value-type="string" calcext:value-type="string">
            <text:p>ad23e2ab</text:p>
          </table:table-cell>
          <table:table-cell/>
          <table:table-cell office:value-type="string" calcext:value-type="string">
            <text:p>moving session include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7-16T09:35:27.392000000</dc:date>
    <meta:editing-duration>PT5M26S</meta:editing-duration>
    <meta:editing-cycles>1</meta:editing-cycles>
    <meta:document-statistic meta:table-count="1" meta:cell-count="574" meta:object-count="0"/>
    <meta:generator>LibreOffice/7.3.5.2$Windows_X86_64 LibreOffice_project/184fe81b8c8c30d8b5082578aee2fed2ea847c01</meta:generator>
  </office:meta>
</office:document-meta>
</file>